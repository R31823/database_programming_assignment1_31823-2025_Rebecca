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1.02cm" fo:min-width="3.944cm" style:writing-mode="lr-tb" loext:decorative="false"/>
      <style:paragraph-properties style:writing-mode="lr-tb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1.02cm" fo:min-width="3.945cm" style:writing-mode="lr-tb" loext:decorative="false"/>
      <style:paragraph-properties style:writing-mode="lr-tb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1.02cm" fo:min-width="3.208cm" style:writing-mode="lr-tb" loext:decorative="false"/>
      <style:paragraph-properties style:writing-mode="lr-tb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0.424cm" fo:min-width="1.296cm" style:writing-mode="lr-tb" loext:decorative="false"/>
      <style:paragraph-properties style:writing-mode="lr-tb"/>
    </style:style>
    <style:style style:name="gr5" style:family="graphic" style:parent-style-name="standard">
      <style:graphic-properties draw:opacity="50%" draw:textarea-horizontal-align="justify" draw:textarea-vertical-align="middle" draw:auto-grow-height="false" fo:min-height="0.424cm" fo:min-width="2.628cm" style:writing-mode="lr-tb" loext:decorative="false"/>
      <style:paragraph-properties style:writing-mode="lr-tb"/>
    </style:style>
    <style:style style:name="gr6" style:family="graphic" style:parent-style-name="standard">
      <style:graphic-properties draw:opacity="50%" draw:textarea-horizontal-align="justify" draw:textarea-vertical-align="middle" draw:auto-grow-height="false" fo:min-height="0.567cm" fo:min-width="3.317cm" style:writing-mode="lr-tb" loext:decorative="false"/>
      <style:paragraph-properties style:writing-mode="lr-tb"/>
    </style:style>
    <style:style style:name="gr7" style:family="graphic" style:parent-style-name="standard">
      <style:graphic-properties svg:stroke-opacity="40%" draw:opacity="50%" draw:textarea-horizontal-align="justify" draw:textarea-vertical-align="middle" draw:auto-grow-height="false" fo:min-height="0.648cm" fo:min-width="2.643cm" style:writing-mode="lr-tb" loext:decorative="false"/>
      <style:paragraph-properties style:writing-mode="lr-tb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0.648cm" fo:min-width="3.092cm" style:writing-mode="lr-tb" loext:decorative="false"/>
      <style:paragraph-properties style:writing-mode="lr-tb"/>
    </style:style>
    <style:style style:name="gr9" style:family="graphic" style:parent-style-name="standard">
      <style:graphic-properties draw:opacity="50%" draw:textarea-horizontal-align="justify" draw:textarea-vertical-align="middle" draw:auto-grow-height="false" fo:min-height="0.425cm" fo:min-width="2.194cm" style:writing-mode="lr-tb" loext:decorative="false"/>
      <style:paragraph-properties style:writing-mode="lr-tb"/>
    </style:style>
    <style:style style:name="gr10" style:family="graphic" style:parent-style-name="standard">
      <style:graphic-properties draw:opacity="50%" draw:textarea-horizontal-align="justify" draw:textarea-vertical-align="middle" draw:auto-grow-height="false" fo:min-height="0.873cm" fo:min-width="1.971cm" style:writing-mode="lr-tb" loext:decorative="false"/>
      <style:paragraph-properties style:writing-mode="lr-tb"/>
    </style:style>
    <style:style style:name="gr11" style:family="graphic" style:parent-style-name="standard">
      <style:graphic-properties draw:opacity="50%" draw:textarea-horizontal-align="justify" draw:textarea-vertical-align="middle" draw:auto-grow-height="false" fo:min-height="1.097cm" fo:min-width="2.004cm" style:writing-mode="lr-tb" loext:decorative="false"/>
      <style:paragraph-properties style:writing-mode="lr-tb"/>
    </style:style>
    <style:style style:name="gr12" style:family="graphic" style:parent-style-name="standard">
      <style:graphic-properties draw:opacity="50%" draw:textarea-horizontal-align="justify" draw:textarea-vertical-align="middle" draw:auto-grow-height="false" fo:min-height="0.696cm" fo:min-width="2.361cm" style:writing-mode="lr-tb" loext:decorative="false"/>
      <style:paragraph-properties style:writing-mode="lr-tb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0.648cm" fo:min-width="3.541cm" style:writing-mode="lr-tb" loext:decorative="false"/>
      <style:paragraph-properties style:writing-mode="lr-tb"/>
    </style:style>
    <style:style style:name="gr14" style:family="graphic" style:parent-style-name="standard">
      <style:graphic-properties draw:opacity="50%" draw:textarea-horizontal-align="justify" draw:textarea-vertical-align="middle" draw:auto-grow-height="false" fo:min-height="0.648cm" fo:min-width="2.453cm" style:writing-mode="lr-tb" loext:decorative="false"/>
      <style:paragraph-properties style:writing-mode="lr-tb"/>
    </style:style>
    <style:style style:name="gr15" style:family="graphic" style:parent-style-name="standard">
      <style:graphic-properties draw:opacity="50%" draw:textarea-horizontal-align="justify" draw:textarea-vertical-align="middle" draw:auto-grow-height="false" fo:min-height="0.424cm" fo:min-width="1.587cm" style:writing-mode="lr-tb" loext:decorative="false"/>
      <style:paragraph-properties style:writing-mode="lr-tb"/>
    </style:style>
    <style:style style:name="gr16" style:family="graphic" style:parent-style-name="standard">
      <style:graphic-properties draw:opacity="50%" draw:textarea-horizontal-align="justify" draw:textarea-vertical-align="middle" draw:auto-grow-height="false" fo:min-height="0.803cm" fo:min-width="1.901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vertical-align="middle" loext:decorative="false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standard">
      <style:graphic-properties draw:fill="solid" draw:fill-color="#eeeeee" draw:textarea-horizontal-align="justify" draw:textarea-vertical-align="middle" draw:auto-grow-height="false" fo:min-height="3.1cm" fo:min-width="7.667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86cm" fo:min-width="0.136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226cm" fo:min-width="0.136cm" loext:decorative="false"/>
    </style:style>
    <style:style style:name="gr22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226cm" fo:min-width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 style:writing-mode="lr-tb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opacity="5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eeeeee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4cm" svg:height="1.27cm" svg:x="8.938cm" svg:y="7.667cm">
          <text:p text:style-name="P1">Order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27cm" svg:x="13.377cm" svg:y="2.905cm">
          <text:p text:style-name="P1">Product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08cm" svg:height="1.27cm" svg:x="4.277cm" svg:y="2.905cm">
          <text:p text:style-name="P1">Client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952cm" svg:x="1.635cm" svg:y="1.435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422cm" svg:height="0.952cm" svg:x="3.88cm" svg:y="7.985cm">
          <text:p text:style-name="P1">qua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5.397cm" svg:height="1.153cm" svg:x="13.7cm" svg:y="9.372cm">
          <text:p text:style-name="P1">product_id (f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.445cm" svg:height="1.27cm" svg:x="9.672cm" svg:y="9.89cm">
          <text:p text:style-name="P3"><text:span text:style-name="T1">order_id (p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08cm" svg:height="1.27cm" svg:x="4.71cm" svg:y="9.472cm">
          <text:p text:style-name="P1">order_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81cm" svg:height="0.953cm" svg:x="4.492cm" svg:y="0.999cm">
          <text:p text:style-name="P1">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493cm" svg:height="1.587cm" svg:x="1.582cm" svg:y="4.793cm">
          <text:p text:style-name="P1">client_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3.54cm" svg:height="1.905cm" svg:x="0.2cm" svg:y="2.805cm">
          <text:p text:style-name="P1"><text:span text:style-name="T1">client_id (p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4.045cm" svg:height="1.338cm" svg:x="14.617cm" svg:y="4.792cm">
          <text:p text:style-name="P1">product_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5.715cm" svg:height="1.27cm" svg:x="14.017cm" svg:y="7.667cm">
          <text:p text:style-name="P1">client_name (f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175cm" svg:height="1.27cm" svg:x="15.875cm" svg:y="1.317cm">
          <text:p text:style-name="P1"><text:span text:style-name="T1">product_id (p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2.949cm" svg:height="0.952cm" svg:x="12.656cm" svg:y="1.735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3.395cm" svg:height="1.487cm" svg:x="18.195cm" svg:y="2.802cm">
          <text:p text:style-name="P1">categ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3.153cm" svg:y1="8.937cm" svg:x2="14.017cm" svg:y2="9.572cm">
          <text:p/>
        </draw:line>
        <draw:line draw:style-name="gr18" draw:text-style-name="P5" draw:layer="layout" svg:x1="4.246cm" svg:y1="3.813cm" svg:x2="3.611cm" svg:y2="3.496cm">
          <text:p/>
        </draw:line>
        <draw:line draw:style-name="gr18" draw:text-style-name="P5" draw:layer="layout" svg:x1="4.492cm" svg:y1="4.175cm" svg:x2="4.175cm" svg:y2="4.81cm">
          <text:p/>
        </draw:line>
        <draw:line draw:style-name="gr18" draw:text-style-name="P5" draw:layer="layout" svg:x1="5.445cm" svg:y1="1.952cm" svg:x2="5.762cm" svg:y2="2.905cm">
          <text:p/>
        </draw:line>
        <draw:line draw:style-name="gr18" draw:text-style-name="P5" draw:layer="layout" svg:x1="3.857cm" svg:y1="2.27cm" svg:x2="4.492cm" svg:y2="2.905cm">
          <text:p/>
        </draw:line>
        <draw:line draw:style-name="gr18" draw:text-style-name="P5" draw:layer="layout" svg:x1="18.224cm" svg:y1="3.399cm" svg:x2="17.827cm" svg:y2="3.54cm">
          <text:p/>
        </draw:line>
        <draw:line draw:style-name="gr18" draw:text-style-name="P5" draw:layer="layout" svg:x1="17.51cm" svg:y1="2.587cm" svg:x2="17.192cm" svg:y2="2.905cm">
          <text:p/>
        </draw:line>
        <draw:line draw:style-name="gr18" draw:text-style-name="P5" draw:layer="layout" svg:x1="15.287cm" svg:y1="2.587cm" svg:x2="15.605cm" svg:y2="2.905cm">
          <text:p/>
        </draw:line>
        <draw:line draw:style-name="gr18" draw:text-style-name="P5" draw:layer="layout" svg:x1="16.24cm" svg:y1="4.81cm" svg:x2="16.875cm" svg:y2="4.175cm">
          <text:p/>
        </draw:line>
        <draw:line draw:style-name="gr18" draw:text-style-name="P5" draw:layer="layout" svg:x1="8.937cm" svg:y1="7.985cm" svg:x2="8.302cm" svg:y2="8.302cm">
          <text:p/>
        </draw:line>
        <draw:line draw:style-name="gr18" draw:text-style-name="P5" draw:layer="layout" svg:x1="8.937cm" svg:y1="9.572cm" svg:x2="9.572cm" svg:y2="8.937cm">
          <text:p/>
        </draw:line>
        <draw:line draw:style-name="gr18" draw:text-style-name="P5" draw:layer="layout" svg:x1="12.43cm" svg:y1="8.937cm" svg:x2="11.477cm" svg:y2="9.863cm">
          <text:p/>
        </draw:line>
        <draw:line draw:style-name="gr18" draw:text-style-name="P5" draw:layer="layout" svg:x1="13.382cm" svg:y1="7.985cm" svg:x2="14.017cm" svg:y2="8.302cm">
          <text:p/>
        </draw:line>
        <draw:custom-shape draw:style-name="gr19" draw:text-style-name="P6" draw:layer="layout" svg:width="8.819cm" svg:height="3.616cm" svg:x="2.249cm" svg:y="14.42cm">
          <text:p text:style-name="P1">PK: primary key</text:p>
          <text:p text:style-name="P1">FK: foreign key</text:p>
          <text:p text:style-name="P1">1:N: one to many</text:p>
          <text:p text:style-name="P1">:relationshi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0" draw:text-style-name="P1" draw:layer="layout" svg:width="1.27cm" svg:height="1.27cm" svg:x="7.667cm" svg:y="5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draw:layer="layout" svg:width="1.27cm" svg:height="0.952cm" draw:transform="rotate (-0.546811654649823) translate (12.335cm 5.18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2" draw:text-style-name="P5" draw:layer="layout" svg:x1="7.985cm" svg:y1="4.175cm" svg:x2="8.302cm" svg:y2="5.445cm">
          <text:p text:style-name="P1">1</text:p>
        </draw:line>
        <draw:line draw:style-name="gr22" draw:text-style-name="P5" draw:layer="layout" svg:x1="8.62cm" svg:y1="6.397cm" svg:x2="8.937cm" svg:y2="7.667cm">
          <text:p text:style-name="P1">N</text:p>
        </draw:line>
        <draw:line draw:style-name="gr22" draw:text-style-name="P5" draw:layer="layout" svg:x1="13.382cm" svg:y1="4.175cm" svg:x2="12.747cm" svg:y2="5.445cm">
          <text:p text:style-name="P1">1</text:p>
        </draw:line>
        <draw:line draw:style-name="gr22" draw:text-style-name="P5" draw:layer="layout" svg:x1="12.43cm" svg:y1="6.397cm" svg:x2="11.795cm" svg:y2="7.667cm">
          <text:p text:style-name="P1">N</text:p>
        </draw:line>
        <draw:custom-shape draw:style-name="gr23" draw:text-style-name="P1" draw:layer="layout" svg:width="0.318cm" svg:height="0.952cm" svg:x="4.492cm" svg:y="16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9T17:09:39.711071600</meta:creation-date>
    <dc:date>2026-06-29T18:04:08.435637600</dc:date>
    <meta:editing-duration>PT9M1S</meta:editing-duration>
    <meta:editing-cycles>2</meta:editing-cycles>
    <meta:generator>LibreOffice/25.8.7.1$Windows_X86_64 LibreOffice_project/39c3b7ac021cfb9f4ca681457ad36828f90e2ce7</meta:generator>
    <meta:document-statistic meta:object-count="37"/>
  </office:meta>
</office:document-meta>
</file>